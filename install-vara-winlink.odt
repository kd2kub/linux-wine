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32903" officeooo:paragraph-rsid="00032903"/>
    </style:style>
    <style:style style:name="P2" style:family="paragraph" style:parent-style-name="Standard">
      <style:paragraph-properties fo:break-before="page"/>
      <style:text-properties officeooo:rsid="00032903" officeooo:paragraph-rsid="000329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to install VARA Software on WINE or Crossover</text:p>
      <text:p text:style-name="P1"/>
      <text:p text:style-name="P1">1_ Create a new bottle</text:p>
      <text:p text:style-name="P1">2_ Install VARA HF</text:p>
      <text:p text:style-name="P1">3_ Install prerequisite packages or run /opt/cxfix after running VARA first. Sometimes it is worth just running cxfix with - -all command (2 dashes)</text:p>
      <text:p text:style-name="P1">4. Download following packages from repository and install each file in wow64 folder or system32 folder. <text:s/>Run regsvr32.exe for each file. <text:s/>I found it to be trial and error which file belonged where. <text:s/>This was a pain in the ass.</text:p>
      <text:p text:style-name="P1">5_ Install MS VSC++ 2017 redistro</text:p>
      <text:p text:style-name="P1">6_ Install VS C++ 2015-2019 Redistro</text:p>
      <text:p text:style-name="P1">7_Install All VB6 packages for runtime service pack 1 and normal</text:p>
      <text:p text:style-name="P1">8_ Install VB 6.0 Common Controls</text:p>
      <text:p text:style-name="P1">9_ Install all .NET Frameworks 2.0 – 4.8</text:p>
      <text:p text:style-name="P1">10_ I installed chart controls, but I don’t think it is needed. <text:s/>Exclude until needed. </text:p>
      <text:p text:style-name="P1">11_ Confirm everything is working with VARA.<text:line-break/>12_ install VARA FM</text:p>
      <text:p text:style-name="P1">13_ install Winlink and configure all.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7T23:12:39.510051741</meta:creation-date>
    <dc:date>2026-05-17T23:20:53.199428794</dc:date>
    <meta:editing-duration>PT8M14S</meta:editing-duration>
    <meta:editing-cycles>1</meta:editing-cycles>
    <meta:document-statistic meta:table-count="0" meta:image-count="0" meta:object-count="0" meta:page-count="2" meta:paragraph-count="13" meta:word-count="150" meta:character-count="862" meta:non-whitespace-character-count="718"/>
    <meta:generator>LibreOffice/25.2.3.2$Linux_X86_64 LibreOffice_project/520$Build-2</meta:generator>
  </office:meta>
</office:document-meta>
</file>